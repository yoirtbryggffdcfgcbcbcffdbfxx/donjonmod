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935a" officeooo:paragraph-rsid="0005935a"/>
    </style:style>
    <style:style style:name="P2" style:family="paragraph" style:parent-style-name="Standard">
      <style:text-properties officeooo:rsid="00073bd3" officeooo:paragraph-rsid="00073bd3"/>
    </style:style>
    <style:style style:name="P3" style:family="paragraph" style:parent-style-name="Standard">
      <style:text-properties officeooo:rsid="00080bc2" officeooo:paragraph-rsid="00080bc2"/>
    </style:style>
    <style:style style:name="P4" style:family="paragraph" style:parent-style-name="Standard">
      <style:text-properties officeooo:rsid="0009da2c" officeooo:paragraph-rsid="0009da2c"/>
    </style:style>
    <style:style style:name="T1" style:family="text">
      <style:text-properties officeooo:rsid="00080b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erveur se nomme donjocraft.</text:p>
      <text:p text:style-name="P1">Le but du jeu est de devenir le maire du village.</text:p>
      <text:p text:style-name="P1">Le village est cassé (c’est le lobby)</text:p>
      <text:p text:style-name="P1">Pour pouvoir devenir le maire du village il faut avoir ces compétences du métier au maximum.</text:p>
      <text:p text:style-name="P1">Il y a 3 métier différents.</text:p>
      <text:p text:style-name="P1">Le métier de mineur, qui gagne de l’exp en cassant des blocs cassable dans la mine (le donjon). Pour cela il as besoin de la pioche du donjon qu’il gagne automatiquement quand il entre dans le donjon, sauf que celle se casse quand il va dans la salle 2. Il doit alors trouver dans les coffres qui seront présent dans le donjon de l’essence de pioche. Cela permetras pour chaque essence de pioche trouvé, de gagner de la durabilité à la pioche. Une essence de pioche donne 5 de durabilité donc peut faire permettre à la pioche de casser 5 bloc cassable par celle ci. (les bloc cassables sont des bloc de minerai, en fonction de la difficulté du donjon, les blocs sont différent et donne plus d’exp pour le métier)</text:p>
      <text:p text:style-name="P1">Le métier de bucheron, qui gagne de l’exp en allant couper des arbres dans la mine (le donjon). Ici, c’est différents, les arbres ne sont pas présent de base dans la mine, il faut trouver une salle spécifique ou se trouveras un un bloc d’herbe, poser une pousse d’arbre (celle ci son trouvable dans la mine, et chaque pousse d’arbre et trouvable en fonction de la difficulté du donjon et donne plus d’exp une fois l’arbre coupé en fonction de la difficulté), une fois la pousse d’arbre mis en place, une vague de monstre arriveras dans la salle et celle ci seras fermé, on ne pourras plus y sortir, il faudras alors tuer tout les monstres avec notre hache et la pousse d’arbre grandiras et on pourras avec un clique droit desssus, coupé directement l’arbre.</text:p>
      <text:p text:style-name="P2">Pour le métier de bucheron, si l’on ne dispose pas d’hache, alors on ne peut pas rentrer dans la salle spécifique ou il y a le bloc de terre)</text:p>
      <text:p text:style-name="P2">Enfin le métier d’aventurier, celui ci gange de l’exp à chaque fois qu’un coffre est trouvé ou un passage secret est découvert dans le dj actuelle. Il impose donc l’exploration pour les joueurs.</text:p>
      <text:p text:style-name="P2"/>
      <text:p text:style-name="P2">Dans le spawn du serveur se trouveras des pnj donnant des quètes. Pour ouvrir l’interface quètes il faudras faire /quetes et là on auras devant nous l’écran de base des succès de minecraft. Il y auras des quètes secondaire et des quètes principale. Le spawn est assez petit, mais dedans se trouveras une tonne de secret, des passages secret, des portes à ouvrir via des codes, des leviers à activer pour ouvrir une salle pouvant amener à un pnj etc. J’essaierais de faire 12 quètes principale ouvrant des nouvelles possibilté de gameplay au joueur, apprenant au joueur de véritables astuces sur le dj etc. Ce seras des quètes sympa commençant par par exemple parler avec tel villageois jusqu’à trouver au sein du spawn, les 3 clefs maudites. Les quètes deviendront de plus en plus complex au fil que l’on arrive à la fin de la dernire quète. Les quètes secondaires seront soit car l’on auras trouvé dans 1 des 10 coffres caché un item permettant de découvrir tel truc ou autee, à juste la fin d’un passage secret qui débouche à un pnj nous donnant la quètes secondaires la plus utile qu’est de comment on craft une hache. Tout le serveur se joue en aventure.</text:p>
      <text:p text:style-name="P2">Je mettrais 4 quètes secondaires. Chaque quètes apporteras du contenu en plus pour le joueur, que ce soit secondaires ou principale. Il y auras aussi un système de missions que nous devons réaliser chaque semaine et chaque jour, ces missions ne seront pas les même pour chaque joueur, et celle ci seras en fonction del’avancé du joueur. Il y a un système de niveaux donc pour les métier, et notre niveaux globale est la somme de tout les niveaux de nos métiers. Les quètes seront alors en fonctionnde <text:span text:style-name="T1">de cela, et ne parlerons pas on ne demanderas que des choses que l’on connaît en fonction de notre parcours dans le jeu.</text:span></text:p>
      <text:p text:style-name="P2"/>
      <text:p text:style-name="P3">Les donjons peuvent ètre effecrué à plusieurs via un /party, les loot sont partagé entre toute l’équipe, et le serveur seras en peer2peer entre les 2 joueurs, un qii fait l’hote et un autre qui seras client. À la fin d’un donjon, se trouve une récompense aléatoire, ces récompenses permettent de créer des armures et des armes meilleur. Les armures et les armes auront des capacité interessant dans les donjon, allant de une armure en set complet permettant de pouvoir savoir ou se situe un passage secret dans un dj à un armure permettant de tuer les mobs directement dans la salle de la pousse <text:soft-page-break/>d’arbre. Il y auras un dj mensuel qui donneras des récompenses pour pouvoir se créer des armures cosmérique. Le jeu est F2P, il n’y as pas de système économique, les gens peuvent mettre oui ou non de la’argent, mais cela ne donne pas d’avantage réel, juste des cosmétique ou des noms dans le tchat ou autre. Pour la mine, en fonction de la difficulté, les armures que l’on peut créer sont de plus en plus puisante, cependant, il y a un max pour chaque armure, et une armure de tier 3 donc venant du dj difficulté 3 ne peut pas ètre mis dans un dj difficulté moindre. Chaque semaine, les meilleurs temps de complétion des dj hebdomadaire de difficulté reçevront des récompense interessante.</text:p>
      <text:p text:style-name="P2"/>
      <text:p text:style-name="P2"/>
      <text:p text:style-name="P2"/>
      <text:p text:style-name="P2"/>
      <text:p text:style-name="P2"/>
      <text:p text:style-name="P4">Modèle :</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8T20:36:55.030383700</meta:creation-date>
    <dc:date>2026-06-19T18:37:22.366880300</dc:date>
    <meta:editing-duration>PT1H19M55S</meta:editing-duration>
    <meta:editing-cycles>2</meta:editing-cycles>
    <meta:generator>LibreOffice/25.8.4.2$Windows_X86_64 LibreOffice_project/290daaa01b999472f0c7a3890eb6a550fd74c6df</meta:generator>
    <meta:document-statistic meta:table-count="0" meta:image-count="0" meta:object-count="0" meta:page-count="2" meta:paragraph-count="13" meta:word-count="919" meta:character-count="5112" meta:non-whitespace-character-count="4206"/>
  </office:meta>
</office:document-meta>
</file>